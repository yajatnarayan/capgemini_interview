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0b3d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standard">
      <style:graphic-properties draw:stroke="none" svg:stroke-width="0.026cm" svg:stroke-linecap="butt" draw:fill="solid" draw:fill-color="#12ab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5">
      <style:graphic-properties draw:stroke="solid" svg:stroke-width="0.026cm" svg:stroke-color="#d5dde6" svg:stroke-linecap="butt" draw:fill="solid" draw:fill-color="#f1f4f8" draw:textarea-vertical-align="middle" draw:auto-grow-height="false" draw:fit-to-size="false" style:shrink-to-fit="false" fo:min-height="0cm" fo:min-width="0cm" fo:padding-top="0.305cm" fo:padding-bottom="0.305cm" fo:padding-left="0.508cm" fo:padding-right="0.508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5">
      <style:graphic-properties draw:stroke="solid" svg:stroke-width="0.026cm" svg:stroke-color="#d5dde6" svg:stroke-linecap="butt" draw:fill="solid" draw:fill-color="#f1f4f8" draw:textarea-vertical-align="middle" draw:auto-grow-height="false" draw:fit-to-size="false" style:shrink-to-fit="false" fo:min-height="0cm" fo:min-width="0cm" fo:padding-top="0.305cm" fo:padding-bottom="0.305cm" fo:padding-left="0.508cm" fo:padding-right="0.508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5">
      <style:graphic-properties draw:stroke="solid" svg:stroke-width="0.026cm" svg:stroke-color="#d5dde6" svg:stroke-linecap="butt" draw:fill="solid" draw:fill-color="#f1f4f8" draw:textarea-vertical-align="middle" draw:auto-grow-height="false" draw:fit-to-size="false" style:shrink-to-fit="false" fo:min-height="0cm" fo:min-width="0cm" fo:padding-top="0.305cm" fo:padding-bottom="0.305cm" fo:padding-left="0.508cm" fo:padding-right="0.508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5">
      <style:graphic-properties draw:stroke="solid" svg:stroke-width="0.026cm" svg:stroke-color="#d5dde6" svg:stroke-linecap="butt" draw:fill="solid" draw:fill-color="#f1f4f8" draw:textarea-vertical-align="middle" draw:auto-grow-height="false" draw:fit-to-size="false" style:shrink-to-fit="false" fo:min-height="0cm" fo:min-width="0cm" fo:padding-top="0.305cm" fo:padding-bottom="0.305cm" fo:padding-left="0.508cm" fo:padding-right="0.508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5">
      <style:graphic-properties draw:stroke="solid" svg:stroke-width="0.026cm" svg:stroke-color="#d5dde6" svg:stroke-linecap="butt" draw:fill="solid" draw:fill-color="#f1f4f8" draw:textarea-vertical-align="middle" draw:auto-grow-height="false" draw:fit-to-size="false" style:shrink-to-fit="false" fo:min-height="0cm" fo:min-width="0cm" fo:padding-top="0.305cm" fo:padding-bottom="0.305cm" fo:padding-left="0.508cm" fo:padding-right="0.508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5">
      <style:graphic-properties draw:stroke="solid" svg:stroke-width="0.026cm" svg:stroke-color="#d5dde6" svg:stroke-linecap="butt" draw:fill="solid" draw:fill-color="#f1f4f8" draw:textarea-vertical-align="middle" draw:auto-grow-height="false" draw:fit-to-size="false" style:shrink-to-fit="false" fo:min-height="0cm" fo:min-width="0cm" fo:padding-top="0.305cm" fo:padding-bottom="0.305cm" fo:padding-left="0.508cm" fo:padding-right="0.508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solid" svg:stroke-width="0.026cm" svg:stroke-color="#d5dde6" svg:stroke-linecap="butt" draw:fill="solid" draw:fill-color="#f1f4f8" draw:textarea-vertical-align="middle" draw:auto-grow-height="false" draw:fit-to-size="false" style:shrink-to-fit="false" fo:min-height="0cm" fo:min-width="0cm" fo:padding-top="0.305cm" fo:padding-bottom="0.305cm" fo:padding-left="0.508cm" fo:padding-right="0.508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4" style:family="graphic" style:parent-style-name="standard" style:list-style-name="L5">
      <style:graphic-properties draw:stroke="solid" svg:stroke-width="0.026cm" svg:stroke-color="#d5dde6" svg:stroke-linecap="butt" draw:fill="solid" draw:fill-color="#f1f4f8" draw:textarea-vertical-align="middle" draw:auto-grow-height="false" draw:fit-to-size="false" style:shrink-to-fit="false" fo:min-height="2.032cm" fo:min-width="29.294cm" fo:padding-top="0.305cm" fo:padding-bottom="0.305cm" fo:padding-left="0.508cm" fo:padding-right="0.508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b3d66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12abdb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.141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.071cm" fo:margin-bottom="0.318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1.27cm" fo:margin-right="0cm" fo:margin-top="0.071cm" fo:margin-bottom="0.318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.071cm" fo:margin-bottom="0.318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1f4f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5pt" style:font-size-asian="13.5pt" style:font-size-complex="13.5pt" fo:hyphenate="false"/>
    </style:style>
    <style:style style:name="P17" style:family="paragraph">
      <loext:graphic-properties draw:fill="solid" draw:fill-color="#f1f4f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style:font-size-asian="13.5pt" style:font-size-complex="13.5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bfe3f4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b3d66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142a3f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142a3f" loext:opacity="100%" style:text-outline="false" style:text-line-through-style="none" style:text-line-through-type="none" style:text-position="0% 100%" style:font-name="Consolas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11" style:family="text">
      <style:text-properties fo:font-variant="normal" fo:text-transform="none" fo:color="#142a3f" loext:opacity="100%" style:text-outline="false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555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b3d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42a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202cm" svg:x="0cm" svg:y="11.5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5" draw:layer="layout" svg:width="29.293cm" svg:height="3.566cm" svg:x="2.286cm" svg:y="6.096cm">
          <text:p text:style-name="P3"><text:span text:style-name="T1">Directory Size Calculator</text:span></text:p>
          <text:p text:style-name="P4"><text:span text:style-name="T2">A recursive, in-memory file system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7" draw:layer="layout" svg:width="7.835cm" svg:height="1.744cm" svg:x="13.015cm" svg:y="12.192cm">
          <text:p text:style-name="P6"><text:span text:style-name="T3">Capgemini Technical Take-Home</text:span></text:p>
          <text:p text:style-name="P6"><text:span text:style-name="T3">Yajat Narayan <text:s/>· <text:s/>5/27/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" draw:text-style-name="P5" draw:layer="layout" svg:width="30.817cm" svg:height="1.521cm" svg:x="1.524cm" svg:y="0.661cm">
          <text:p text:style-name="P3"><text:span text:style-name="T4">The 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10" draw:layer="layout" svg:width="0.664cm" svg:height="0.632cm" svg:x="31.12cm" svg:y="17.907cm">
          <text:p text:style-name="P9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3" draw:layer="layout" svg:width="30.309cm" svg:height="8.812cm" svg:x="1.778cm" svg:y="3.937cm">
          <text:p text:style-name="P11"><text:span text:style-name="T6">▪ <text:s/></text:span><text:span text:style-name="T6">Simulate a file system: directories holding files; each file has a size</text:span></text:p>
          <text:p text:style-name="P11"><text:span text:style-name="T6">▪ <text:s/></text:span><text:span text:style-name="T6">Support three commands:</text:span></text:p>
          <text:p text:style-name="P12"><text:span text:style-name="T7">– <text:s/></text:span><text:span text:style-name="T7">cd <text:s/>— change directory</text:span></text:p>
          <text:p text:style-name="P12"><text:span text:style-name="T7">– <text:s/></text:span><text:span text:style-name="T7">ls <text:s/>— list the current directory's contents</text:span></text:p>
          <text:p text:style-name="P12"><text:span text:style-name="T7">– <text:s/></text:span><text:span text:style-name="T7">size — total size of the current directory, recursively</text:span></text:p>
          <text:p text:style-name="P11"><text:span text:style-name="T6">▪ <text:s/></text:span><text:span text:style-name="T6">Recursion is the preferred approach for size</text:span></text:p>
          <text:p text:style-name="P11"><text:span text:style-name="T6">▪ <text:s/></text:span><text:span text:style-name="T6">All data in memory</text:span></text:p>
          <text:p text:style-name="P11"><text:span text:style-name="T6">▪ <text:s/></text:span><text:span text:style-name="T6">Command-line application built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" draw:text-style-name="P5" draw:layer="layout" svg:width="30.817cm" svg:height="1.521cm" svg:x="1.524cm" svg:y="0.661cm">
          <text:p text:style-name="P3"><text:span text:style-name="T4">Solution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" draw:text-style-name="P10" draw:layer="layout" svg:width="0.664cm" svg:height="0.632cm" svg:x="31.12cm" svg:y="17.907cm">
          <text:p text:style-name="P9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13" draw:layer="layout" svg:width="30.309cm" svg:height="5.617cm" svg:x="1.778cm" svg:y="3.937cm">
          <text:p text:style-name="P11"><text:span text:style-name="T6">▪ <text:s/></text:span><text:span text:style-name="T6">A command-line REPL written in plain Java</text:span></text:p>
          <text:p text:style-name="P11"><text:span text:style-name="T6">▪ <text:s/></text:span><text:span text:style-name="T6">File system modeled as a tree of Node objects</text:span></text:p>
          <text:p text:style-name="P11"><text:span text:style-name="T6">▪ <text:s/></text:span><text:span text:style-name="T6">size computed recursively across all subdirectories</text:span></text:p>
          <text:p text:style-name="P11"><text:span text:style-name="T6">▪ <text:s/></text:span><text:span text:style-name="T6">Bonus tree command visualizes the hierarchy</text:span></text:p>
          <text:p text:style-name="P11"><text:span text:style-name="T6">▪ <text:s/></text:span><text:span text:style-name="T6">No build tool; JUnit bundled as one j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4" draw:text-style-name="P5" draw:layer="layout" svg:width="30.817cm" svg:height="1.521cm" svg:x="1.524cm" svg:y="0.661cm">
          <text:p text:style-name="P3"><text:span text:style-name="T4">Design &amp;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6" draw:text-style-name="P10" draw:layer="layout" svg:width="0.664cm" svg:height="0.632cm" svg:x="31.12cm" svg:y="17.907cm">
          <text:p text:style-name="P9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7" draw:text-style-name="P13" draw:layer="layout" svg:width="16.255cm" svg:height="4.466cm" svg:x="1.778cm" svg:y="3.81cm">
          <text:p text:style-name="P11"><text:span text:style-name="T6">▪ <text:s/></text:span><text:span text:style-name="T6">Every node is a file or a directory (isFile flag)</text:span></text:p>
          <text:p text:style-name="P11"><text:span text:style-name="T6">▪ <text:s/></text:span><text:span text:style-name="T6">Node fields: name, size, isFile, children, parent</text:span></text:p>
          <text:p text:style-name="P11"><text:span text:style-name="T6">▪ <text:s/></text:span><text:span text:style-name="T6">FileSystem holds root and current (the working directory)</text:span></text:p>
          <text:p text:style-name="P11"><text:span text:style-name="T6">▪ <text:s/></text:span><text:span text:style-name="T6">Parent reference on each node makes cd .. triv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8" draw:text-style-name="P5" draw:layer="layout" svg:width="2.62cm" svg:height="0.758cm" svg:x="24.216cm" svg:y="3.81cm">
          <text:p text:style-name="P3"><text:span text:style-name="T8">A Node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9" draw:text-style-name="P14" draw:layer="layout" svg:width="13.461cm" svg:height="9.956cm" svg:x="18.796cm" svg:y="4.724cm">
          <text:p text:style-name="P3"><text:span text:style-name="T9">/</text:span></text:p>
          <text:p text:style-name="P3"><text:span text:style-name="T9">├── </text:span><text:span text:style-name="T9">docs/</text:span></text:p>
          <text:p text:style-name="P3"><text:span text:style-name="T9">│ <text:s text:c="2"/>├── </text:span><text:span text:style-name="T9">readme.txt</text:span></text:p>
          <text:p text:style-name="P3"><text:span text:style-name="T9">│ <text:s text:c="2"/>└── </text:span><text:span text:style-name="T9">guide.pdf</text:span></text:p>
          <text:p text:style-name="P3"><text:span text:style-name="T9">├── </text:span><text:span text:style-name="T9">photos/</text:span></text:p>
          <text:p text:style-name="P3"><text:span text:style-name="T9">│ <text:s text:c="2"/>├── </text:span><text:span text:style-name="T9">vacation/</text:span></text:p>
          <text:p text:style-name="P3"><text:span text:style-name="T9">│ <text:s text:c="2"/>│ <text:s text:c="2"/>├── </text:span><text:span text:style-name="T9">beach.jpg</text:span></text:p>
          <text:p text:style-name="P3"><text:span text:style-name="T9">│ <text:s text:c="2"/>│ <text:s text:c="2"/>└── </text:span><text:span text:style-name="T9">sunset.jpg</text:span></text:p>
          <text:p text:style-name="P3"><text:span text:style-name="T9">│ <text:s text:c="2"/>└── </text:span><text:span text:style-name="T9">profile.jpg</text:span></text:p>
          <text:p text:style-name="P3"><text:span text:style-name="T9">└── </text:span><text:span text:style-name="T9">code/</text:span></text:p>
          <text:p text:style-name="P3"><text:span text:style-name="T9"><text:s text:c="4"/>└── </text:span><text:span text:style-name="T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" draw:text-style-name="P5" draw:layer="layout" svg:width="30.817cm" svg:height="1.521cm" svg:x="1.524cm" svg:y="0.661cm">
          <text:p text:style-name="P3"><text:span text:style-name="T4">Key Design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2" draw:text-style-name="P10" draw:layer="layout" svg:width="0.664cm" svg:height="0.632cm" svg:x="31.12cm" svg:y="17.907cm">
          <text:p text:style-name="P9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3" draw:text-style-name="P13" draw:layer="layout" svg:width="30.309cm" svg:height="5.531cm" svg:x="1.778cm" svg:y="3.937cm">
          <text:p text:style-name="P11"><text:span text:style-name="T6">▪ <text:s/></text:span><text:span text:style-name="T6">Recursion is used to determine size, the natural fit for a tree (and the brief's hint)</text:span></text:p>
          <text:p text:style-name="P11"><text:span text:style-name="T6">▪ <text:s/></text:span><text:span text:style-name="T6">Parent pointers instead of a path stack allows for a simpler cd ..</text:span></text:p>
          <text:p text:style-name="P11"><text:span text:style-name="T6">▪ <text:s/></text:span><text:span text:style-name="T6">A single isFile flag, not File/Directory subclasses</text:span></text:p>
          <text:p text:style-name="P12"><text:span text:style-name="T7">– <text:s/></text:span><text:span text:style-name="T7">avoids over-engineering for the scope</text:span></text:p>
          <text:p text:style-name="P11"><text:span text:style-name="T6">▪ <text:s/></text:span><text:span text:style-name="T6">Plain Java + one JUnit jar minimizes setup for revie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4" draw:text-style-name="P5" draw:layer="layout" svg:width="30.817cm" svg:height="1.521cm" svg:x="1.524cm" svg:y="0.661cm">
          <text:p text:style-name="P3"><text:span text:style-name="T4">How size 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5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6" draw:text-style-name="P10" draw:layer="layout" svg:width="0.664cm" svg:height="0.632cm" svg:x="31.12cm" svg:y="17.907cm">
          <text:p text:style-name="P9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7" draw:text-style-name="P13" draw:layer="layout" svg:width="30.309cm" svg:height="3.315cm" svg:x="1.778cm" svg:y="3.81cm">
          <text:p text:style-name="P11"><text:span text:style-name="T6">▪ <text:s/></text:span><text:span text:style-name="T6">Base case: a file returns its own size in bytes</text:span></text:p>
          <text:p text:style-name="P11"><text:span text:style-name="T6">▪ <text:s/></text:span><text:span text:style-name="T6">Recursive case: a directory sums its children</text:span></text:p>
          <text:p text:style-name="P11"><text:span text:style-name="T6">▪ <text:s/></text:span><text:span text:style-name="T6">Directories themselves contribute 0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8" draw:text-style-name="P5" draw:layer="layout" svg:width="3.204cm" svg:height="0.758cm" svg:x="15.33cm" svg:y="8.89cm">
          <text:p text:style-name="P3"><text:span text:style-name="T8">FileSystem.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4" draw:layer="layout" svg:width="30.309cm" svg:height="6.705cm" svg:x="1.778cm" svg:y="9.804cm">
          <text:p text:style-name="P15"><text:span text:style-name="T10">static int calculateSize(Node node) {</text:span></text:p>
          <text:p text:style-name="P3"><text:span text:style-name="T10"><text:s text:c="4"/></text:span><text:span text:style-name="T10">if (node.isFile) return node.size;</text:span></text:p>
          <text:p text:style-name="P3"><text:span text:style-name="T10"><text:s text:c="4"/></text:span><text:span text:style-name="T10">int total = 0;</text:span></text:p>
          <text:p text:style-name="P3"><text:span text:style-name="T10"><text:s text:c="4"/></text:span><text:span text:style-name="T10">for (Node child : node.children)</text:span></text:p>
          <text:p text:style-name="P3"><text:span text:style-name="T10"><text:s text:c="8"/></text:span><text:span text:style-name="T10">total += calculateSize(child);</text:span></text:p>
          <text:p text:style-name="P3"><text:span text:style-name="T10"><text:s text:c="4"/></text:span><text:span text:style-name="T10">return total;</text:span></text:p>
          <text:p text:style-name="P3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0" draw:text-style-name="P5" draw:layer="layout" svg:width="30.817cm" svg:height="1.521cm" svg:x="1.524cm" svg:y="0.661cm">
          <text:p text:style-name="P3"><text:span text:style-name="T4">Key Files &amp; Fol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1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2" draw:text-style-name="P10" draw:layer="layout" svg:width="0.664cm" svg:height="0.632cm" svg:x="31.12cm" svg:y="17.907cm">
          <text:p text:style-name="P9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14" draw:layer="layout" svg:width="30.309cm" svg:height="8.33cm" svg:x="1.778cm" svg:y="4.064cm">
          <text:p text:style-name="P15"><text:span text:style-name="T11">src/</text:span></text:p>
          <text:p text:style-name="P3"><text:span text:style-name="T11"><text:s text:c="2"/></text:span><text:span text:style-name="T11">Node.java <text:s text:c="11"/>data model: name, size, isFile, children, parent</text:span></text:p>
          <text:p text:style-name="P3"><text:span text:style-name="T11"><text:s text:c="2"/></text:span><text:span text:style-name="T11">FileSystem.java <text:s text:c="5"/>tree, commands (cd/ls/size/tree), seed data</text:span></text:p>
          <text:p text:style-name="P3"><text:span text:style-name="T11"><text:s text:c="2"/></text:span><text:span text:style-name="T11">Main.java <text:s text:c="11"/>REPL loop</text:span></text:p>
          <text:p text:style-name="P3"><text:span text:style-name="T11"><text:s text:c="2"/></text:span><text:span text:style-name="T11">FileSystemTest.java <text:s/>JUnit 5 tests for calculateSize</text:span></text:p>
          <text:p text:style-name="P3"><text:span text:style-name="T11">lib/</text:span></text:p>
          <text:p text:style-name="P3"><text:span text:style-name="T11"><text:s text:c="2"/></text:span><text:span text:style-name="T11">junit-platform-console-standalone-6.1.0.jar <text:s text:c="2"/>bundled JUnit</text:span></text:p>
          <text:p text:style-name="P3"><text:span text:style-name="T11">README.md <text:s text:c="13"/>approach, run / test / verify steps</text:span></text:p>
          <text:p text:style-name="P3"><text:span text:style-name="T11">.gitign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13" draw:layer="layout" svg:width="30.309cm" svg:height="1.013cm" svg:x="1.778cm" svg:y="14.478cm">
          <text:p text:style-name="P11"><text:span text:style-name="T6">▪ <text:s/></text:span><text:span text:style-name="T6">Three production files + one test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5" draw:text-style-name="P5" draw:layer="layout" svg:width="30.817cm" svg:height="1.521cm" svg:x="1.524cm" svg:y="0.661cm">
          <text:p text:style-name="P3"><text:span text:style-name="T4">Test &amp; See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6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7" draw:text-style-name="P10" draw:layer="layout" svg:width="0.664cm" svg:height="0.632cm" svg:x="31.12cm" svg:y="17.907cm">
          <text:p text:style-name="P9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8" draw:text-style-name="P13" draw:layer="layout" svg:width="13.207cm" svg:height="1.013cm" svg:x="1.778cm" svg:y="3.81cm">
          <text:p text:style-name="P11"><text:span text:style-name="T6">▪ <text:s/></text:span><text:span text:style-name="T6">Seed tree built in the FileSystem construct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9" draw:text-style-name="P5" draw:layer="layout" svg:width="3.318cm" svg:height="0.758cm" svg:x="9.008cm" svg:y="4.953cm">
          <text:p text:style-name="P3"><text:span text:style-name="T8">Seed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0" draw:text-style-name="P14" draw:layer="layout" svg:width="17.779cm" svg:height="11.581cm" svg:x="1.778cm" svg:y="5.867cm">
          <text:p text:style-name="P15"><text:span text:style-name="T9">/</text:span></text:p>
          <text:p text:style-name="P3"><text:span text:style-name="T9">├── </text:span><text:span text:style-name="T9">docs/</text:span></text:p>
          <text:p text:style-name="P3"><text:span text:style-name="T9">│ <text:s text:c="2"/>├── </text:span><text:span text:style-name="T9">readme.txt <text:s text:c="4"/>(1,024)</text:span></text:p>
          <text:p text:style-name="P3"><text:span text:style-name="T9">│ <text:s text:c="2"/>└── </text:span><text:span text:style-name="T9">guide.pdf <text:s text:c="5"/>(50,000)</text:span></text:p>
          <text:p text:style-name="P3"><text:span text:style-name="T9">├── </text:span><text:span text:style-name="T9">photos/</text:span></text:p>
          <text:p text:style-name="P3"><text:span text:style-name="T9">│ <text:s text:c="2"/>├── </text:span><text:span text:style-name="T9">vacation/</text:span></text:p>
          <text:p text:style-name="P3"><text:span text:style-name="T9">│ <text:s text:c="2"/>│ <text:s text:c="2"/>├── </text:span><text:span text:style-name="T9">beach.jpg <text:s/>(2,000,000)</text:span></text:p>
          <text:p text:style-name="P3"><text:span text:style-name="T9">│ <text:s text:c="2"/>│ <text:s text:c="2"/>└── </text:span><text:span text:style-name="T9">sunset.jpg (1,500,000)</text:span></text:p>
          <text:p text:style-name="P3"><text:span text:style-name="T9">│ <text:s text:c="2"/>└── </text:span><text:span text:style-name="T9">profile.jpg <text:s text:c="3"/>(500,000)</text:span></text:p>
          <text:p text:style-name="P3"><text:span text:style-name="T9">└── </text:span><text:span text:style-name="T9">code/</text:span></text:p>
          <text:p text:style-name="P3"><text:span text:style-name="T9"><text:s text:c="4"/>├── </text:span><text:span text:style-name="T9">project/src/ <text:s text:c="2"/>(4,700)</text:span></text:p>
          <text:p text:style-name="P3"><text:span text:style-name="T9"><text:s text:c="4"/>├── </text:span><text:span text:style-name="T9">project/tests/ (800)</text:span></text:p>
          <text:p text:style-name="P3"><text:span text:style-name="T9"><text:s text:c="4"/>└── </text:span><text:span text:style-name="T9">notes.md <text:s text:c="6"/>(25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1" draw:text-style-name="P13" draw:layer="layout" svg:width="11.175cm" svg:height="7.065cm" svg:x="20.828cm" svg:y="5.334cm">
          <text:p text:style-name="P11"><text:span text:style-name="T12">▪ <text:s/></text:span><text:span text:style-name="T12">docs</text:span></text:p>
          <text:p text:style-name="P12"><text:span text:style-name="T13">– <text:s/></text:span><text:span text:style-name="T13">51,024 bytes</text:span></text:p>
          <text:p text:style-name="P11"><text:span text:style-name="T12">▪ <text:s/></text:span><text:span text:style-name="T12">photos</text:span></text:p>
          <text:p text:style-name="P12"><text:span text:style-name="T13">– <text:s/></text:span><text:span text:style-name="T13">4,000,000 bytes</text:span></text:p>
          <text:p text:style-name="P11"><text:span text:style-name="T12">▪ <text:s/></text:span><text:span text:style-name="T12">code</text:span></text:p>
          <text:p text:style-name="P12"><text:span text:style-name="T13">– <text:s/></text:span><text:span text:style-name="T13">5,750 bytes</text:span></text:p>
          <text:p text:style-name="P11"><text:span text:style-name="T12">▪ <text:s/></text:span><text:span text:style-name="T12">Total: 4,056,774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2" draw:text-style-name="P5" draw:layer="layout" svg:width="30.817cm" svg:height="1.521cm" svg:x="1.524cm" svg:y="0.661cm">
          <text:p text:style-name="P3"><text:span text:style-name="T4">Running the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3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4" draw:text-style-name="P10" draw:layer="layout" svg:width="0.664cm" svg:height="0.632cm" svg:x="31.12cm" svg:y="17.907cm">
          <text:p text:style-name="P9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5" draw:text-style-name="P5" draw:layer="layout" svg:width="3.051cm" svg:height="0.758cm" svg:x="15.407cm" svg:y="4.064cm">
          <text:p text:style-name="P3"><text:span text:style-name="T8">Compile &amp;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6" draw:text-style-name="P14" draw:layer="layout" svg:width="30.309cm" svg:height="2.641cm" svg:x="1.778cm" svg:y="4.978cm">
          <text:p text:style-name="P3"><text:span text:style-name="T10">javac -d out src/Node.java src/FileSystem.java src/Main.java</text:span></text:p>
          <text:p text:style-name="P3"><text:span text:style-name="T10">java -cp out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7" draw:text-style-name="P5" draw:layer="layout" svg:width="3.178cm" svg:height="0.758cm" svg:x="15.343cm" svg:y="8.128cm">
          <text:p text:style-name="P3"><text:span text:style-name="T8">Sample 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8" draw:text-style-name="P14" draw:layer="layout" svg:width="30.309cm" svg:height="11.581cm" svg:x="1.905cm" svg:y="9.042cm">
          <text:p text:style-name="P3"><text:span text:style-name="T10">&gt; ls</text:span></text:p>
          <text:p text:style-name="P3"><text:span text:style-name="T10">[DIR] <text:s/>docs/</text:span></text:p>
          <text:p text:style-name="P3"><text:span text:style-name="T10">[DIR] <text:s/>photos/</text:span></text:p>
          <text:p text:style-name="P3"><text:span text:style-name="T10">[DIR] <text:s/>code/</text:span></text:p>
          <text:p text:style-name="P3"><text:span text:style-name="T10">&gt; cd photos</text:span></text:p>
          <text:p text:style-name="P3"><text:span text:style-name="T10">&gt; size</text:span></text:p>
          <text:p text:style-name="P3"><text:span text:style-name="T10">4000000 bytes</text:span></text:p>
          <text:p text:style-name="P3"><text:span text:style-name="T10">&gt; tree</text:span></text:p>
          <text:p text:style-name="P3"><text:span text:style-name="T10">photos/</text:span></text:p>
          <text:p text:style-name="P3"><text:span text:style-name="T10"><text:s text:c="2"/></text:span><text:span text:style-name="T10">vacation/</text:span></text:p>
          <text:p text:style-name="P3"><text:span text:style-name="T10"><text:s text:c="4"/></text:span><text:span text:style-name="T10">beach.jpg (2000000 bytes)</text:span></text:p>
          <text:p text:style-name="P3"><text:span text:style-name="T10"><text:s text:c="4"/></text:span><text:span text:style-name="T10">sunset.jpg (1500000 bytes)</text:span></text:p>
          <text:p text:style-name="P3"><text:span text:style-name="T10"><text:s text:c="2"/></text:span><text:span text:style-name="T10">profile.jpg (500000 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9" draw:text-style-name="P5" draw:layer="layout" svg:width="30.817cm" svg:height="1.521cm" svg:x="1.524cm" svg:y="0.661cm">
          <text:p text:style-name="P3"><text:span text:style-name="T4">Testing &amp; Ver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0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10" draw:layer="layout" svg:width="0.825cm" svg:height="0.632cm" svg:x="31.04cm" svg:y="17.907cm">
          <text:p text:style-name="P9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2" draw:text-style-name="P13" draw:layer="layout" svg:width="30.309cm" svg:height="8.64cm" svg:x="1.778cm" svg:y="3.81cm">
          <text:p text:style-name="P11"><text:span text:style-name="T6">▪ <text:s/></text:span><text:span text:style-name="T6">JUnit 5, run via the bundled console launcher</text:span></text:p>
          <text:p text:style-name="P11"><text:span text:style-name="T6">▪ <text:s/></text:span><text:span text:style-name="T6">Six tests target the recursive size calculation:</text:span></text:p>
          <text:p text:style-name="P12"><text:span text:style-name="T7">– <text:s/></text:span><text:span text:style-name="T7">empty directory → 0</text:span></text:p>
          <text:p text:style-name="P12"><text:span text:style-name="T7">– <text:s/></text:span><text:span text:style-name="T7">single file → its size <text:s/>· <text:s/>file passed directly → own size</text:span></text:p>
          <text:p text:style-name="P12"><text:span text:style-name="T7">– <text:s/></text:span><text:span text:style-name="T7">nested directories → correct sum</text:span></text:p>
          <text:p text:style-name="P12"><text:span text:style-name="T7">– <text:s/></text:span><text:span text:style-name="T7">10 levels deep → recursion handles depth</text:span></text:p>
          <text:p text:style-name="P12"><text:span text:style-name="T7">– <text:s/></text:span><text:span text:style-name="T7">full seed tree → 4,056,774 bytes</text:span></text:p>
          <text:p text:style-name="P11"><text:span text:style-name="T6">▪ <text:s/></text:span><text:span text:style-name="T6">All pass; launcher exits non-zero on failure (CI-friendl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3" draw:text-style-name="P14" draw:layer="layout" svg:width="30.309cm" svg:height="2.641cm" svg:x="1.778cm" svg:y="15.24cm">
          <text:p text:style-name="P3"><text:span text:style-name="T11">[ <text:s text:c="8"/>6 tests successful <text:s text:c="5"/>]</text:span></text:p>
          <text:p text:style-name="P3"><text:span text:style-name="T11">[ <text:s text:c="8"/>0 tests failed <text:s text:c="9"/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4" draw:text-style-name="P17" draw:layer="layout" svg:width="30.309cm" svg:height="2.641cm" svg:x="1.778cm" svg:y="12.345cm">
          <text:p text:style-name="P16"><text:span text:style-name="T10">javac -cp lib/junit-platform-console-standalone-6.1.0.jar -d out src/Node.java src/FileSystem.java src/FileSystemTest.java</text:span></text:p>
          <text:p text:style-name="P16"><text:span text:style-name="T10">java -jar lib/junit-platform-console-standalone-6.1.0.jar execute --class-path out --scan-class-path</text:span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Rectangle 1" draw:style-name="gr1" draw:text-style-name="P1" draw:layer="layout" svg:width="33.865cm" svg:height="2.6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65cm" svg:height="0.151cm" svg:x="0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5" draw:text-style-name="P5" draw:layer="layout" svg:width="30.817cm" svg:height="1.521cm" svg:x="1.524cm" svg:y="0.661cm">
          <text:p text:style-name="P3"><text:span text:style-name="T4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6" draw:text-style-name="P5" draw:layer="layout" svg:width="6.874cm" svg:height="0.632cm" svg:x="8.246cm" svg:y="17.907cm">
          <text:p text:style-name="P3"><text:span text:style-name="T5">Directory Size Calculator <text:s/>· <text:s/>Capgemini Take-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10" draw:layer="layout" svg:width="0.825cm" svg:height="0.632cm" svg:x="31.04cm" svg:y="17.907cm">
          <text:p text:style-name="P9"><text:span text:style-name="T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8" draw:text-style-name="P13" draw:layer="layout" svg:width="30.309cm" svg:height="5.617cm" svg:x="1.778cm" svg:y="3.937cm">
          <text:p text:style-name="P11"><text:span text:style-name="T6">▪ <text:s/></text:span><text:span text:style-name="T6">Tree-based model with recursive size</text:span></text:p>
          <text:p text:style-name="P11"><text:span text:style-name="T6">▪ <text:s/></text:span><text:span text:style-name="T6">Clean, dependency-light: clone, javac, java</text:span></text:p>
          <text:p text:style-name="P11"><text:span text:style-name="T6">▪ <text:s/></text:span><text:span text:style-name="T6">Tested with JUnit and documented in the README</text:span></text:p>
          <text:p text:style-name="P11"><text:span text:style-name="T6">▪ <text:s/></text:span><text:span text:style-name="T6">Bonus tree command for quick visualization</text:span></text:p>
          <text:p text:style-name="P11"><text:span text:style-name="T6">▪ <text:s/></text:span><text:span text:style-name="T6">Thank you! happy to walk through the code or answer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 style:writing-mode="lr-tb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4</meta:editing-cycles>
    <meta:creation-date>2013-01-27T09:14:16</meta:creation-date>
    <dc:date>2026-05-27T15:16:36.013000000</dc:date>
    <meta:editing-duration>PT18M24S</meta:editing-duration>
    <meta:generator>View_PPTX_PLUS/7.4.0.3$Windows_X86_64 LibreOffice_project/</meta:generator>
    <meta:document-statistic meta:object-count="120"/>
    <meta:user-defined meta:name="AppVersion">14.0000</meta:user-defined>
    <meta:user-defined meta:name="PresentationFormat">On-screen Show (4:3)</meta:user-defined>
  </office:meta>
</office:document-meta>
</file>